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sage-logo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xmlns:presentation="urn:oasis:names:tc:opendocument:xmlns:presentation:1.0" xmlns:manifest="urn:oasis:names:tc:opendocument:xmlns:manifest:1.0" office:version="1.2">
  <office:automatic-styles>
    <style:style style:name="Background" style:family="drawing-page">
      <style:drawing-page-properties draw:fill="solid" draw:fill-color="#F7F8F5"/>
    </style:style>
    <style:style style:name="BackgroundDark" style:family="drawing-page">
      <style:drawing-page-properties draw:fill="solid" draw:fill-color="#F7F8F5"/>
    </style:style>
    <style:style style:name="TextFrame" style:family="graphic">
      <style:graphic-properties draw:stroke="none" draw:fill="none" fo:padding="0cm"/>
    </style:style>
    <style:style style:name="Image" style:family="graphic">
      <style:graphic-properties draw:stroke="none" draw:fill="none"/>
    </style:style>
    <style:style style:name="Card" style:family="graphic">
      <style:graphic-properties draw:stroke="solid" svg:stroke-color="#D8E0DB" draw:fill="solid" draw:fill-color="#FFFFFF" draw:corner-radius="0.3cm"/>
    </style:style>
    <style:style style:name="CardAccent" style:family="graphic">
      <style:graphic-properties draw:stroke="solid" svg:stroke-color="#77A092" draw:fill="solid" draw:fill-color="#EFF5F1" draw:corner-radius="0.3cm"/>
    </style:style>
    <style:style style:name="GoldLine" style:family="graphic">
      <style:graphic-properties draw:stroke="none" draw:fill="solid" draw:fill-color="#C99222"/>
    </style:style>
    <style:style style:name="Title" style:family="paragraph">
      <style:paragraph-properties fo:margin-bottom="0cm"/>
      <style:text-properties fo:font-family="Liberation Sans" fo:font-size="28pt" fo:font-weight="bold" fo:color="#092A54"/>
    </style:style>
    <style:style style:name="Hero" style:family="paragraph">
      <style:text-properties fo:font-family="Liberation Sans" fo:font-size="50pt" fo:font-weight="bold" fo:color="#092A54"/>
    </style:style>
    <style:style style:name="Subtitle" style:family="paragraph">
      <style:text-properties fo:font-family="Liberation Sans" fo:font-size="18pt" fo:color="#52766F"/>
    </style:style>
    <style:style style:name="Statement" style:family="paragraph">
      <style:paragraph-properties fo:text-align="center"/>
      <style:text-properties fo:font-family="Noto Sans CJK KR" fo:font-size="20pt" fo:font-weight="bold" fo:color="#173B58"/>
    </style:style>
    <style:style style:name="Body" style:family="paragraph">
      <style:paragraph-properties fo:margin-bottom="0.35cm"/>
      <style:text-properties fo:font-family="Noto Sans CJK KR" fo:font-size="16pt" fo:color="#263B46"/>
    </style:style>
    <style:style style:name="CardTitle" style:family="paragraph">
      <style:paragraph-properties fo:text-align="center"/>
      <style:text-properties fo:font-family="Liberation Sans" fo:font-size="18pt" fo:font-weight="bold" fo:color="#0B315E"/>
    </style:style>
    <style:style style:name="SectionTitle" style:family="paragraph">
      <style:text-properties fo:font-family="Noto Sans CJK KR" fo:font-size="19pt" fo:font-weight="bold" fo:color="#52766F"/>
    </style:style>
    <style:style style:name="Callout" style:family="paragraph">
      <style:paragraph-properties fo:text-align="center"/>
      <style:text-properties fo:font-family="Noto Sans CJK KR" fo:font-size="15pt" fo:font-weight="bold" fo:color="#8D6415"/>
    </style:style>
    <style:style style:name="Equation" style:family="paragraph">
      <style:paragraph-properties fo:text-align="center"/>
      <style:text-properties fo:font-family="Liberation Mono" fo:font-size="24pt" fo:font-weight="bold" fo:color="#092A54"/>
    </style:style>
    <style:style style:name="Metric" style:family="paragraph">
      <style:paragraph-properties fo:text-align="center"/>
      <style:text-properties fo:font-family="Liberation Sans" fo:font-size="44pt" fo:font-weight="bold" fo:color="#092A54"/>
    </style:style>
    <style:style style:name="MetricGreen" style:family="paragraph">
      <style:paragraph-properties fo:text-align="center"/>
      <style:text-properties fo:font-family="Liberation Sans" fo:font-size="38pt" fo:font-weight="bold" fo:color="#2E7563"/>
    </style:style>
    <style:style style:name="MetricGold" style:family="paragraph">
      <style:paragraph-properties fo:text-align="center"/>
      <style:text-properties fo:font-family="Liberation Sans" fo:font-size="38pt" fo:font-weight="bold" fo:color="#C28B1B"/>
    </style:style>
    <style:style style:name="MetricRed" style:family="paragraph">
      <style:paragraph-properties fo:text-align="center"/>
      <style:text-properties fo:font-family="Liberation Sans" fo:font-size="38pt" fo:font-weight="bold" fo:color="#A64B49"/>
    </style:style>
    <style:style style:name="MetricLabel" style:family="paragraph">
      <style:paragraph-properties fo:text-align="center"/>
      <style:text-properties fo:font-family="Liberation Sans" fo:font-size="16pt" fo:color="#52766F"/>
    </style:style>
    <style:style style:name="Evidence" style:family="paragraph">
      <style:paragraph-properties fo:margin-bottom="0.45cm"/>
      <style:text-properties fo:font-family="Liberation Mono" fo:font-size="17pt" fo:color="#173B58"/>
    </style:style>
    <style:style style:name="Code" style:family="paragraph">
      <style:paragraph-properties fo:text-align="center"/>
      <style:text-properties fo:font-family="Liberation Mono" fo:font-size="14pt" fo:color="#092A54"/>
    </style:style>
    <style:style style:name="Closing" style:family="paragraph">
      <style:paragraph-properties fo:text-align="center"/>
      <style:text-properties fo:font-family="Liberation Sans" fo:font-size="25pt" fo:font-weight="bold" fo:color="#092A54"/>
    </style:style>
    <style:style style:name="Footer" style:family="paragraph">
      <style:text-properties fo:font-family="Liberation Sans" fo:font-size="8pt" fo:color="#7D8D8A"/>
    </style:style>
    <style:presentation-page-layout style:name="AL1T0">
      <presentation:placeholder presentation:object="title" svg:x="1cm" svg:y="1cm" svg:width="31cm" svg:height="2cm"/>
    </style:presentation-page-layout>
  </office:automatic-styles>
  <office:body>
    <office:presentation>
      <draw:page draw:name="Title" draw:style-name="Background" draw:master-page-name="Standard" presentation:presentation-page-layout-name="AL1T0">
        <draw:frame draw:style-name="Image" svg:x="1.8cm" svg:y="2.2cm" svg:width="10.8cm" svg:height="10.8cm">
          <draw:image xlink:href="Pictures/sage-logo.png" xlink:type="simple" xlink:show="embed" xlink:actuate="onLoad"/>
        </draw:frame>
        <draw:frame draw:style-name="TextFrame" svg:x="14.0cm" svg:y="4.0cm" svg:width="17.5cm" svg:height="2.3cm">
          <draw:text-box>
            <text:p text:style-name="Hero">SAGE</text:p>
          </draw:text-box>
        </draw:frame>
        <draw:frame draw:style-name="TextFrame" svg:x="14.1cm" svg:y="6.5cm" svg:width="17.2cm" svg:height="1.4cm">
          <draw:text-box>
            <text:p text:style-name="Subtitle">Situation Engineering for Evidence-Applicable AI</text:p>
          </draw:text-box>
        </draw:frame>
        <draw:rect draw:style-name="GoldLine" svg:x="14.1cm" svg:y="8.4cm" svg:width="2.4cm" svg:height="0.18cm"/>
        <draw:frame draw:style-name="TextFrame" svg:x="14.1cm" svg:y="9.2cm" svg:width="16.8cm" svg:height="2.4cm">
          <draw:text-box>
            <text:p text:style-name="Statement">관련된 증거가 지금 이 질문에</text:p>
            <text:p text:style-name="Statement">실제로 적용 가능한가?</text:p>
          </draw:text-box>
        </draw:frame>
        <draw:frame draw:style-name="TextFrame" svg:x="1.2cm" svg:y="18.25cm" svg:width="22cm" svg:height="0.45cm">
          <draw:text-box>
            <text:p text:style-name="Footer">SAGE · Situation Engineering</text:p>
          </draw:text-box>
        </draw:frame>
        <draw:frame draw:style-name="TextFrame" svg:x="31.4cm" svg:y="18.25cm" svg:width="1.2cm" svg:height="0.45cm">
          <draw:text-box>
            <text:p text:style-name="Footer">1</text:p>
          </draw:text-box>
        </draw:frame>
      </draw:page>
      <draw:page draw:name="Problem" draw:style-name="Background" draw:master-page-name="Standard" presentation:presentation-page-layout-name="AL1T0">
        <draw:frame draw:style-name="TextFrame" svg:x="1.4cm" svg:y="1.0cm" svg:width="30.5cm" svg:height="1.3cm">
          <draw:text-box>
            <text:p text:style-name="Title">문제: 관련성만으로는 충분하지 않다</text:p>
          </draw:text-box>
        </draw:frame>
        <draw:rect draw:style-name="Card" svg:x="1.5cm" svg:y="3.1cm" svg:width="9.5cm" svg:height="10.8cm"/>
        <draw:rect draw:style-name="Card" svg:x="12.2cm" svg:y="3.1cm" svg:width="9.5cm" svg:height="10.8cm"/>
        <draw:rect draw:style-name="Card" svg:x="22.9cm" svg:y="3.1cm" svg:width="9.5cm" svg:height="10.8cm"/>
        <draw:frame draw:style-name="TextFrame" svg:x="2.2cm" svg:y="4.0cm" svg:width="8.1cm" svg:height="1.0cm">
          <draw:text-box>
            <text:p text:style-name="CardTitle">STALE</text:p>
          </draw:text-box>
        </draw:frame>
        <draw:frame draw:style-name="TextFrame" svg:x="2.2cm" svg:y="5.4cm" svg:width="8.0cm" svg:height="5.8cm">
          <draw:text-box>
            <text:p text:style-name="Body">과거에는 참이었지만</text:p>
            <text:p text:style-name="Body">질문 시점에는 만료된 사실</text:p>
            <text:p text:style-name="Body"/>
            <text:p text:style-name="Body">→ 시간 상태 필요</text:p>
          </draw:text-box>
        </draw:frame>
        <draw:frame draw:style-name="TextFrame" svg:x="12.9cm" svg:y="4.0cm" svg:width="8.1cm" svg:height="1.0cm">
          <draw:text-box>
            <text:p text:style-name="CardTitle">OUT OF SCOPE</text:p>
          </draw:text-box>
        </draw:frame>
        <draw:frame draw:style-name="TextFrame" svg:x="12.9cm" svg:y="5.4cm" svg:width="8.0cm" svg:height="5.8cm">
          <draw:text-box>
            <text:p text:style-name="Body">특정 조직·지역·사용자에게만</text:p>
            <text:p text:style-name="Body">적용되는 국소적 사실</text:p>
            <text:p text:style-name="Body"/>
            <text:p text:style-name="Body">→ 범위 상태 필요</text:p>
          </draw:text-box>
        </draw:frame>
        <draw:frame draw:style-name="TextFrame" svg:x="23.6cm" svg:y="4.0cm" svg:width="8.1cm" svg:height="1.0cm">
          <draw:text-box>
            <text:p text:style-name="CardTitle">WRONG WORLD</text:p>
          </draw:text-box>
        </draw:frame>
        <draw:frame draw:style-name="TextFrame" svg:x="23.6cm" svg:y="5.4cm" svg:width="8.0cm" svg:height="5.8cm">
          <draw:text-box>
            <text:p text:style-name="Body">가정·제안·소문을 현실의</text:p>
            <text:p text:style-name="Body">확정 사실로 사용하는 오류</text:p>
            <text:p text:style-name="Body"/>
            <text:p text:style-name="Body">→ 양상·세계 상태 필요</text:p>
          </draw:text-box>
        </draw:frame>
        <draw:frame draw:style-name="TextFrame" svg:x="3.0cm" svg:y="15.0cm" svg:width="27.8cm" svg:height="1.2cm">
          <draw:text-box>
            <text:p text:style-name="Callout">Situation blindness = 증거는 맞지만 적용 조건이 틀린 실패</text:p>
          </draw:text-box>
        </draw:frame>
        <draw:frame draw:style-name="TextFrame" svg:x="1.2cm" svg:y="18.25cm" svg:width="22cm" svg:height="0.45cm">
          <draw:text-box>
            <text:p text:style-name="Footer">SAGE · Situation Engineering</text:p>
          </draw:text-box>
        </draw:frame>
        <draw:frame draw:style-name="TextFrame" svg:x="31.4cm" svg:y="18.25cm" svg:width="1.2cm" svg:height="0.45cm">
          <draw:text-box>
            <text:p text:style-name="Footer">2</text:p>
          </draw:text-box>
        </draw:frame>
      </draw:page>
      <draw:page draw:name="Framework" draw:style-name="Background" draw:master-page-name="Standard" presentation:presentation-page-layout-name="AL1T0">
        <draw:frame draw:style-name="TextFrame" svg:x="1.4cm" svg:y="1.0cm" svg:width="30.5cm" svg:height="1.3cm">
          <draw:text-box>
            <text:p text:style-name="Title">SAGE의 핵심: 명시적 Situation State</text:p>
          </draw:text-box>
        </draw:frame>
        <draw:rect draw:style-name="CardAccent" svg:x="1.7cm" svg:y="4.3cm" svg:width="6.4cm" svg:height="5.0cm"/>
        <draw:rect draw:style-name="CardAccent" svg:x="10.0cm" svg:y="4.3cm" svg:width="6.4cm" svg:height="5.0cm"/>
        <draw:rect draw:style-name="CardAccent" svg:x="18.3cm" svg:y="4.3cm" svg:width="6.4cm" svg:height="5.0cm"/>
        <draw:rect draw:style-name="CardAccent" svg:x="26.6cm" svg:y="4.3cm" svg:width="5.5cm" svg:height="5.0cm"/>
        <draw:frame draw:style-name="TextFrame" svg:x="2.2cm" svg:y="5.0cm" svg:width="5.4cm" svg:height="1.0cm">
          <draw:text-box>
            <text:p text:style-name="CardTitle">1 · SENSE</text:p>
          </draw:text-box>
        </draw:frame>
        <draw:frame draw:style-name="TextFrame" svg:x="2.2cm" svg:y="6.4cm" svg:width="5.4cm" svg:height="2.0cm">
          <draw:text-box>
            <text:p text:style-name="Body">질문·증거에서
상태 변수 추출</text:p>
          </draw:text-box>
        </draw:frame>
        <draw:frame draw:style-name="TextFrame" svg:x="10.5cm" svg:y="5.0cm" svg:width="5.4cm" svg:height="1.0cm">
          <draw:text-box>
            <text:p text:style-name="CardTitle">2 · UPDATE</text:p>
          </draw:text-box>
        </draw:frame>
        <draw:frame draw:style-name="TextFrame" svg:x="10.5cm" svg:y="6.4cm" svg:width="5.4cm" svg:height="2.0cm">
          <draw:text-box>
            <text:p text:style-name="Body">충돌·변경·취소를
상태에 반영</text:p>
          </draw:text-box>
        </draw:frame>
        <draw:frame draw:style-name="TextFrame" svg:x="18.8cm" svg:y="5.0cm" svg:width="5.4cm" svg:height="1.0cm">
          <draw:text-box>
            <text:p text:style-name="CardTitle">3 · VALIDATE</text:p>
          </draw:text-box>
        </draw:frame>
        <draw:frame draw:style-name="TextFrame" svg:x="18.8cm" svg:y="6.4cm" svg:width="5.4cm" svg:height="2.0cm">
          <draw:text-box>
            <text:p text:style-name="Body">시간·범위·출처·
관찰자·세계 검증</text:p>
          </draw:text-box>
        </draw:frame>
        <draw:frame draw:style-name="TextFrame" svg:x="27.1cm" svg:y="5.0cm" svg:width="4.5cm" svg:height="1.0cm">
          <draw:text-box>
            <text:p text:style-name="CardTitle">4 · ACT</text:p>
          </draw:text-box>
        </draw:frame>
        <draw:frame draw:style-name="TextFrame" svg:x="27.1cm" svg:y="6.4cm" svg:width="4.5cm" svg:height="2.0cm">
          <draw:text-box>
            <text:p text:style-name="Body">답변 / 검색 /
질문 / 기권</text:p>
          </draw:text-box>
        </draw:frame>
        <draw:frame draw:style-name="TextFrame" svg:x="3.0cm" svg:y="11.4cm" svg:width="27.8cm" svg:height="2.2cm">
          <draw:text-box>
            <text:p text:style-name="Equation">(q, E) → Ŝ → Ŝ′ → policy → answer</text:p>
          </draw:text-box>
        </draw:frame>
        <draw:frame draw:style-name="TextFrame" svg:x="5.0cm" svg:y="14.4cm" svg:width="23.8cm" svg:height="1.2cm">
          <draw:text-box>
            <text:p text:style-name="Callout">상황 상태는 prompt·context·memory·tool을 잇는 검증 계층</text:p>
          </draw:text-box>
        </draw:frame>
        <draw:frame draw:style-name="TextFrame" svg:x="1.2cm" svg:y="18.25cm" svg:width="22cm" svg:height="0.45cm">
          <draw:text-box>
            <text:p text:style-name="Footer">SAGE · Situation Engineering</text:p>
          </draw:text-box>
        </draw:frame>
        <draw:frame draw:style-name="TextFrame" svg:x="31.4cm" svg:y="18.25cm" svg:width="1.2cm" svg:height="0.45cm">
          <draw:text-box>
            <text:p text:style-name="Footer">3</text:p>
          </draw:text-box>
        </draw:frame>
      </draw:page>
      <draw:page draw:name="Benchmark" draw:style-name="Background" draw:master-page-name="Standard" presentation:presentation-page-layout-name="AL1T0">
        <draw:frame draw:style-name="TextFrame" svg:x="1.4cm" svg:y="1.0cm" svg:width="30.5cm" svg:height="1.3cm">
          <draw:text-box>
            <text:p text:style-name="Title">SituationCatch-Bench</text:p>
          </draw:text-box>
        </draw:frame>
        <draw:frame draw:style-name="TextFrame" svg:x="1.6cm" svg:y="3.1cm" svg:width="9.0cm" svg:height="3.0cm">
          <draw:text-box>
            <text:p text:style-name="Metric">4,200</text:p>
          </draw:text-box>
        </draw:frame>
        <draw:frame draw:style-name="TextFrame" svg:x="1.9cm" svg:y="6.1cm" svg:width="8.5cm" svg:height="1.0cm">
          <draw:text-box>
            <text:p text:style-name="MetricLabel">controlled instances</text:p>
          </draw:text-box>
        </draw:frame>
        <draw:frame draw:style-name="TextFrame" svg:x="12.0cm" svg:y="3.1cm" svg:width="9.0cm" svg:height="3.0cm">
          <draw:text-box>
            <text:p text:style-name="Metric">7</text:p>
          </draw:text-box>
        </draw:frame>
        <draw:frame draw:style-name="TextFrame" svg:x="12.3cm" svg:y="6.1cm" svg:width="8.5cm" svg:height="1.0cm">
          <draw:text-box>
            <text:p text:style-name="MetricLabel">diagnostic categories</text:p>
          </draw:text-box>
        </draw:frame>
        <draw:frame draw:style-name="TextFrame" svg:x="22.4cm" svg:y="3.1cm" svg:width="9.0cm" svg:height="3.0cm">
          <draw:text-box>
            <text:p text:style-name="Metric">600</text:p>
          </draw:text-box>
        </draw:frame>
        <draw:frame draw:style-name="TextFrame" svg:x="22.7cm" svg:y="6.1cm" svg:width="8.5cm" svg:height="1.0cm">
          <draw:text-box>
            <text:p text:style-name="MetricLabel">items per category</text:p>
          </draw:text-box>
        </draw:frame>
        <draw:rect draw:style-name="Card" svg:x="1.8cm" svg:y="8.4cm" svg:width="30.0cm" svg:height="5.3cm"/>
        <draw:frame draw:style-name="TextFrame" svg:x="2.6cm" svg:y="9.2cm" svg:width="28.4cm" svg:height="3.8cm">
          <draw:text-box>
            <text:p text:style-name="Statement">Temporal · Hidden premise · Source conflict · Modality</text:p>
            <text:p text:style-name="Statement">Scope · Observer knowledge · Counterfactual world</text:p>
          </draw:text-box>
        </draw:frame>
        <draw:frame draw:style-name="TextFrame" svg:x="3.3cm" svg:y="14.8cm" svg:width="27.4cm" svg:height="1.3cm">
          <draw:text-box>
            <text:p text:style-name="Callout">목적: 자연언어 일반화가 아니라 적용성 불변식의 기계적 진단</text:p>
          </draw:text-box>
        </draw:frame>
        <draw:frame draw:style-name="TextFrame" svg:x="1.2cm" svg:y="18.25cm" svg:width="22cm" svg:height="0.45cm">
          <draw:text-box>
            <text:p text:style-name="Footer">SAGE · Situation Engineering</text:p>
          </draw:text-box>
        </draw:frame>
        <draw:frame draw:style-name="TextFrame" svg:x="31.4cm" svg:y="18.25cm" svg:width="1.2cm" svg:height="0.45cm">
          <draw:text-box>
            <text:p text:style-name="Footer">4</text:p>
          </draw:text-box>
        </draw:frame>
      </draw:page>
      <draw:page draw:name="Results" draw:style-name="Background" draw:master-page-name="Standard" presentation:presentation-page-layout-name="AL1T0">
        <draw:frame draw:style-name="TextFrame" svg:x="1.4cm" svg:y="1.0cm" svg:width="30.5cm" svg:height="1.3cm">
          <draw:text-box>
            <text:p text:style-name="Title">상태 품질이 최종 정확도를 결정한다</text:p>
          </draw:text-box>
        </draw:frame>
        <draw:rect draw:style-name="Card" svg:x="2.0cm" svg:y="4.2cm" svg:width="8.6cm" svg:height="9.4cm"/>
        <draw:rect draw:style-name="Card" svg:x="12.6cm" svg:y="4.2cm" svg:width="8.6cm" svg:height="9.4cm"/>
        <draw:rect draw:style-name="Card" svg:x="23.2cm" svg:y="4.2cm" svg:width="8.6cm" svg:height="9.4cm"/>
        <draw:frame draw:style-name="TextFrame" svg:x="2.7cm" svg:y="5.2cm" svg:width="7.2cm" svg:height="2.0cm">
          <draw:text-box>
            <text:p text:style-name="MetricGreen">100.0%</text:p>
          </draw:text-box>
        </draw:frame>
        <draw:frame draw:style-name="TextFrame" svg:x="3.0cm" svg:y="7.7cm" svg:width="6.8cm" svg:height="1.0cm">
          <draw:text-box>
            <text:p text:style-name="CardTitle">Gold state</text:p>
          </draw:text-box>
        </draw:frame>
        <draw:frame draw:style-name="TextFrame" svg:x="3.0cm" svg:y="9.2cm" svg:width="6.8cm" svg:height="2.5cm">
          <draw:text-box>
            <text:p text:style-name="Body">구조화 상태를
직접 제공</text:p>
          </draw:text-box>
        </draw:frame>
        <draw:frame draw:style-name="TextFrame" svg:x="13.3cm" svg:y="5.2cm" svg:width="7.2cm" svg:height="2.0cm">
          <draw:text-box>
            <text:p text:style-name="MetricGold">77.9%</text:p>
          </draw:text-box>
        </draw:frame>
        <draw:frame draw:style-name="TextFrame" svg:x="13.6cm" svg:y="7.7cm" svg:width="6.8cm" svg:height="1.0cm">
          <draw:text-box>
            <text:p text:style-name="CardTitle">Predicted state</text:p>
          </draw:text-box>
        </draw:frame>
        <draw:frame draw:style-name="TextFrame" svg:x="13.6cm" svg:y="9.2cm" svg:width="6.8cm" svg:height="2.5cm">
          <draw:text-box>
            <text:p text:style-name="Body">claim text에서
상태를 추출</text:p>
          </draw:text-box>
        </draw:frame>
        <draw:frame draw:style-name="TextFrame" svg:x="23.9cm" svg:y="5.2cm" svg:width="7.2cm" svg:height="2.0cm">
          <draw:text-box>
            <text:p text:style-name="MetricRed">35.1%</text:p>
          </draw:text-box>
        </draw:frame>
        <draw:frame draw:style-name="TextFrame" svg:x="24.2cm" svg:y="7.7cm" svg:width="6.8cm" svg:height="1.0cm">
          <draw:text-box>
            <text:p text:style-name="CardTitle">Corrupted state</text:p>
          </draw:text-box>
        </draw:frame>
        <draw:frame draw:style-name="TextFrame" svg:x="24.2cm" svg:y="9.2cm" svg:width="6.8cm" svg:height="2.5cm">
          <draw:text-box>
            <text:p text:style-name="Body">출처·양상·범위를
의도적으로 손상</text:p>
          </draw:text-box>
        </draw:frame>
        <draw:frame draw:style-name="TextFrame" svg:x="4.0cm" svg:y="15.0cm" svg:width="26.0cm" svg:height="1.2cm">
          <draw:text-box>
            <text:p text:style-name="Callout">Oracle 성능만으로는 sensing bottleneck을 볼 수 없다</text:p>
          </draw:text-box>
        </draw:frame>
        <draw:frame draw:style-name="TextFrame" svg:x="1.2cm" svg:y="18.25cm" svg:width="22cm" svg:height="0.45cm">
          <draw:text-box>
            <text:p text:style-name="Footer">SAGE · Situation Engineering</text:p>
          </draw:text-box>
        </draw:frame>
        <draw:frame draw:style-name="TextFrame" svg:x="31.4cm" svg:y="18.25cm" svg:width="1.2cm" svg:height="0.45cm">
          <draw:text-box>
            <text:p text:style-name="Footer">5</text:p>
          </draw:text-box>
        </draw:frame>
      </draw:page>
      <draw:page draw:name="Architecture" draw:style-name="Background" draw:master-page-name="Standard" presentation:presentation-page-layout-name="AL1T0">
        <draw:frame draw:style-name="TextFrame" svg:x="1.4cm" svg:y="1.0cm" svg:width="30.5cm" svg:height="1.3cm">
          <draw:text-box>
            <text:p text:style-name="Title">SCQA Reference Architecture</text:p>
          </draw:text-box>
        </draw:frame>
        <draw:frame draw:style-name="TextFrame" svg:x="1.7cm" svg:y="3.1cm" svg:width="14.4cm" svg:height="1.0cm">
          <draw:text-box>
            <text:p text:style-name="SectionTitle">Situation schema</text:p>
          </draw:text-box>
        </draw:frame>
        <draw:rect draw:style-name="Card" svg:x="1.7cm" svg:y="4.4cm" svg:width="14.4cm" svg:height="9.5cm"/>
        <draw:frame draw:style-name="TextFrame" svg:x="2.5cm" svg:y="5.1cm" svg:width="12.8cm" svg:height="7.8cm">
          <draw:text-box>
            <text:p text:style-name="Body">• actors, entities, events</text:p>
            <text:p text:style-name="Body">• valid time &amp; observation time</text:p>
            <text:p text:style-name="Body">• modality &amp; source status</text:p>
            <text:p text:style-name="Body">• scope &amp; observer knowledge</text:p>
            <text:p text:style-name="Body">• real / counterfactual world</text:p>
            <text:p text:style-name="Body">• unresolved critical variables</text:p>
          </draw:text-box>
        </draw:frame>
        <draw:frame draw:style-name="TextFrame" svg:x="18.0cm" svg:y="3.1cm" svg:width="14.0cm" svg:height="1.0cm">
          <draw:text-box>
            <text:p text:style-name="SectionTitle">Response policy</text:p>
          </draw:text-box>
        </draw:frame>
        <draw:rect draw:style-name="Card" svg:x="18.0cm" svg:y="4.4cm" svg:width="14.0cm" svg:height="9.5cm"/>
        <draw:frame draw:style-name="TextFrame" svg:x="18.8cm" svg:y="5.1cm" svg:width="12.4cm" svg:height="7.8cm">
          <draw:text-box>
            <text:p text:style-name="Body">ANSWER   상태가 충분하고 일관됨</text:p>
            <text:p text:style-name="Body">RETRIEVE  근거 또는 상태가 부족함</text:p>
            <text:p text:style-name="Body">CLARIFY   사용자 변수 확인 필요</text:p>
            <text:p text:style-name="Body">ABSTAIN   신뢰 가능한 판단 불가</text:p>
            <text:p text:style-name="Body"/>
            <text:p text:style-name="Body">모든 결정은 provenance와 함께 기록</text:p>
          </draw:text-box>
        </draw:frame>
        <draw:frame draw:style-name="TextFrame" svg:x="4.3cm" svg:y="15.0cm" svg:width="25.5cm" svg:height="1.2cm">
          <draw:text-box>
            <text:p text:style-name="Callout">소스 구현: code/scqa · 실행 결과: paper/results</text:p>
          </draw:text-box>
        </draw:frame>
        <draw:frame draw:style-name="TextFrame" svg:x="1.2cm" svg:y="18.25cm" svg:width="22cm" svg:height="0.45cm">
          <draw:text-box>
            <text:p text:style-name="Footer">SAGE · Situation Engineering</text:p>
          </draw:text-box>
        </draw:frame>
        <draw:frame draw:style-name="TextFrame" svg:x="31.4cm" svg:y="18.25cm" svg:width="1.2cm" svg:height="0.45cm">
          <draw:text-box>
            <text:p text:style-name="Footer">6</text:p>
          </draw:text-box>
        </draw:frame>
      </draw:page>
      <draw:page draw:name="Evidence" draw:style-name="Background" draw:master-page-name="Standard" presentation:presentation-page-layout-name="AL1T0">
        <draw:frame draw:style-name="TextFrame" svg:x="1.4cm" svg:y="1.0cm" svg:width="30.5cm" svg:height="1.3cm">
          <draw:text-box>
            <text:p text:style-name="Title">Evidence ladder: 주장 범위를 분리한다</text:p>
          </draw:text-box>
        </draw:frame>
        <draw:rect draw:style-name="Card" svg:x="2.0cm" svg:y="3.1cm" svg:width="29.8cm" svg:height="11.6cm"/>
        <draw:frame draw:style-name="TextFrame" svg:x="3.0cm" svg:y="4.0cm" svg:width="27.8cm" svg:height="9.8cm">
          <draw:text-box>
            <text:p text:style-name="Evidence">E1  Formal definition          완료</text:p>
            <text:p text:style-name="Evidence">E2  Oracle-state unit tests     완료 · 4,200 items</text:p>
            <text:p text:style-name="Evidence">E3  Natural prevalence         선행연구가 지지</text:p>
            <text:p text:style-name="Evidence">E4  Predicted-state control    완료 · controlled text</text:p>
            <text:p text:style-name="Evidence">E5  Multi-model intervention   harness 완료 · 실측 미완료</text:p>
            <text:p text:style-name="Evidence">E6  Independent human study    protocol 완료 · 실측 미완료</text:p>
          </draw:text-box>
        </draw:frame>
        <draw:frame draw:style-name="TextFrame" svg:x="4.0cm" svg:y="15.4cm" svg:width="26.0cm" svg:height="1.1cm">
          <draw:text-box>
            <text:p text:style-name="Callout">실행하지 않은 API·사람 평가를 결과처럼 보고하지 않는다</text:p>
          </draw:text-box>
        </draw:frame>
        <draw:frame draw:style-name="TextFrame" svg:x="1.2cm" svg:y="18.25cm" svg:width="22cm" svg:height="0.45cm">
          <draw:text-box>
            <text:p text:style-name="Footer">SAGE · Situation Engineering</text:p>
          </draw:text-box>
        </draw:frame>
        <draw:frame draw:style-name="TextFrame" svg:x="31.4cm" svg:y="18.25cm" svg:width="1.2cm" svg:height="0.45cm">
          <draw:text-box>
            <text:p text:style-name="Footer">7</text:p>
          </draw:text-box>
        </draw:frame>
      </draw:page>
      <draw:page draw:name="Reproducibility" draw:style-name="Background" draw:master-page-name="Standard" presentation:presentation-page-layout-name="AL1T0">
        <draw:frame draw:style-name="TextFrame" svg:x="1.4cm" svg:y="1.0cm" svg:width="30.5cm" svg:height="1.3cm">
          <draw:text-box>
            <text:p text:style-name="Title">Reproducibility package</text:p>
          </draw:text-box>
        </draw:frame>
        <draw:rect draw:style-name="CardAccent" svg:x="1.7cm" svg:y="3.3cm" svg:width="9.3cm" svg:height="10.5cm"/>
        <draw:rect draw:style-name="CardAccent" svg:x="12.2cm" svg:y="3.3cm" svg:width="9.3cm" svg:height="10.5cm"/>
        <draw:rect draw:style-name="CardAccent" svg:x="22.7cm" svg:y="3.3cm" svg:width="9.3cm" svg:height="10.5cm"/>
        <draw:frame draw:style-name="TextFrame" svg:x="2.4cm" svg:y="4.1cm" svg:width="7.9cm" svg:height="1.0cm">
          <draw:text-box>
            <text:p text:style-name="CardTitle">code/</text:p>
          </draw:text-box>
        </draw:frame>
        <draw:frame draw:style-name="TextFrame" svg:x="2.4cm" svg:y="5.7cm" svg:width="7.9cm" svg:height="6.7cm">
          <draw:text-box>
            <text:p text:style-name="Body">SCQA engine</text:p>
            <text:p text:style-name="Body">state sensor</text:p>
            <text:p text:style-name="Body">multi-LLM adapters</text:p>
            <text:p text:style-name="Body">annotation workflow</text:p>
            <text:p text:style-name="Body">automated tests</text:p>
          </draw:text-box>
        </draw:frame>
        <draw:frame draw:style-name="TextFrame" svg:x="12.9cm" svg:y="4.1cm" svg:width="7.9cm" svg:height="1.0cm">
          <draw:text-box>
            <text:p text:style-name="CardTitle">paper/</text:p>
          </draw:text-box>
        </draw:frame>
        <draw:frame draw:style-name="TextFrame" svg:x="12.9cm" svg:y="5.7cm" svg:width="7.9cm" svg:height="6.7cm">
          <draw:text-box>
            <text:p text:style-name="Body">main.tex</text:p>
            <text:p text:style-name="Body">supplementary.tex</text:p>
            <text:p text:style-name="Body">4,200-item dataset</text:p>
            <text:p text:style-name="Body">item-level results</text:p>
            <text:p text:style-name="Body">26 linked references</text:p>
          </draw:text-box>
        </draw:frame>
        <draw:frame draw:style-name="TextFrame" svg:x="23.4cm" svg:y="4.1cm" svg:width="7.9cm" svg:height="1.0cm">
          <draw:text-box>
            <text:p text:style-name="CardTitle">ppt/</text:p>
          </draw:text-box>
        </draw:frame>
        <draw:frame draw:style-name="TextFrame" svg:x="23.4cm" svg:y="5.7cm" svg:width="7.9cm" svg:height="6.7cm">
          <draw:text-box>
            <text:p text:style-name="Body">sage.pptx</text:p>
            <text:p text:style-name="Body">editable source</text:p>
            <text:p text:style-name="Body">research narrative</text:p>
            <text:p text:style-name="Body">measured outcomes</text:p>
            <text:p text:style-name="Body">limitations</text:p>
          </draw:text-box>
        </draw:frame>
        <draw:frame draw:style-name="TextFrame" svg:x="4.0cm" svg:y="15.2cm" svg:width="26.0cm" svg:height="1.2cm">
          <draw:text-box>
            <text:p text:style-name="Code">PYTHONPATH=code python code/run_experiments.py</text:p>
          </draw:text-box>
        </draw:frame>
        <draw:frame draw:style-name="TextFrame" svg:x="1.2cm" svg:y="18.25cm" svg:width="22cm" svg:height="0.45cm">
          <draw:text-box>
            <text:p text:style-name="Footer">SAGE · Situation Engineering</text:p>
          </draw:text-box>
        </draw:frame>
        <draw:frame draw:style-name="TextFrame" svg:x="31.4cm" svg:y="18.25cm" svg:width="1.2cm" svg:height="0.45cm">
          <draw:text-box>
            <text:p text:style-name="Footer">8</text:p>
          </draw:text-box>
        </draw:frame>
      </draw:page>
      <draw:page draw:name="Closing" draw:style-name="Background" draw:master-page-name="Standard" presentation:presentation-page-layout-name="AL1T0">
        <draw:frame draw:style-name="Image" svg:x="12.7cm" svg:y="1.4cm" svg:width="8.5cm" svg:height="8.5cm">
          <draw:image xlink:href="Pictures/sage-logo.png" xlink:type="simple" xlink:show="embed" xlink:actuate="onLoad"/>
        </draw:frame>
        <draw:frame draw:style-name="TextFrame" svg:x="4.0cm" svg:y="10.0cm" svg:width="25.9cm" svg:height="1.6cm">
          <draw:text-box>
            <text:p text:style-name="Closing">Relevant evidence is not necessarily applicable evidence.</text:p>
          </draw:text-box>
        </draw:frame>
        <draw:frame draw:style-name="TextFrame" svg:x="5.0cm" svg:y="12.2cm" svg:width="23.9cm" svg:height="1.2cm">
          <draw:text-box>
            <text:p text:style-name="Subtitle">SAGE makes the active situation explicit, testable, and auditable.</text:p>
          </draw:text-box>
        </draw:frame>
        <draw:rect draw:style-name="GoldLine" svg:x="14.8cm" svg:y="14.5cm" svg:width="4.2cm" svg:height="0.18cm"/>
        <draw:frame draw:style-name="TextFrame" svg:x="9.0cm" svg:y="15.2cm" svg:width="15.8cm" svg:height="1.0cm">
          <draw:text-box>
            <text:p text:style-name="Callout">github.com/leemgs/sage</text:p>
          </draw:text-box>
        </draw:frame>
        <draw:frame draw:style-name="TextFrame" svg:x="1.2cm" svg:y="18.25cm" svg:width="22cm" svg:height="0.45cm">
          <draw:text-box>
            <text:p text:style-name="Footer">SAGE · Situation Engineering</text:p>
          </draw:text-box>
        </draw:frame>
        <draw:frame draw:style-name="TextFrame" svg:x="31.4cm" svg:y="18.25cm" svg:width="1.2cm" svg:height="0.45cm">
          <draw:text-box>
            <text:p text:style-name="Footer">9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xmlns:presentation="urn:oasis:names:tc:opendocument:xmlns:presentation:1.0" xmlns:manifest="urn:oasis:names:tc:opendocument:xmlns:manifest:1.0" office:version="1.2">
  <office:styles>
    <style:style style:name="Standard" style:family="paragraph"/>
  </office:styles>
  <office:automatic-styles>
    <style:page-layout style:name="PM1">
      <style:page-layout-properties fo:page-width="33.867cm" fo:page-height="19.05cm" style:print-orientation="landscape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xmlns:presentation="urn:oasis:names:tc:opendocument:xmlns:presentation:1.0" xmlns:manifest="urn:oasis:names:tc:opendocument:xmlns:manifest:1.0" office:version="1.2">
  <office:meta/>
</office:document-meta>
</file>